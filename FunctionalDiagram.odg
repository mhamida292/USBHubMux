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8cm" fo:min-width="2.675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fo:min-height="1.338cm" fo:min-width="2.358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83caff" draw:textarea-horizontal-align="justify" draw:textarea-vertical-align="middle" draw:auto-grow-height="false" fo:min-height="1.338cm" fo:min-width="2.675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579d1c" draw:textarea-horizontal-align="justify" draw:textarea-vertical-align="middle" draw:auto-grow-height="false" fo:min-height="1.338cm" fo:min-width="2.358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579d1c" draw:textarea-horizontal-align="justify" draw:textarea-vertical-align="middle" draw:auto-grow-height="false" fo:min-height="0.462cm" fo:min-width="2.346cm" style:writing-mode="lr-tb" loext:decorative="false"/>
      <style:paragraph-properties style:writing-mode="lr-tb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d320"/>
      <style:paragraph-properties fo:text-align="center" style:writing-mode="lr-tb"/>
    </style:style>
    <style:style style:name="P4" style:family="paragraph">
      <loext:graphic-properties draw:fill="solid" draw:fill-color="#83caff"/>
      <style:paragraph-properties fo:text-align="center" style:writing-mode="lr-tb"/>
    </style:style>
    <style:style style:name="P5" style:family="paragraph">
      <loext:graphic-properties draw:fill="solid" draw:fill-color="#579d1c"/>
      <style:paragraph-properties fo:text-align="center" style:writing-mode="lr-tb"/>
    </style:style>
    <style:style style:name="P6" style:family="paragraph"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="solid" draw:fill-color="#579d1c"/>
      <style:paragraph-properties fo:text-align="center" style:writing-mode="lr-tb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75cm" svg:height="1.588cm" svg:x="18.78cm" svg:y="7.349cm">
          <text:p text:style-name="P1">USB P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175cm" svg:height="1.588cm" svg:x="18.78cm" svg:y="9.889cm">
          <text:p text:style-name="P1">USB P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858cm" svg:height="1.588cm" svg:x="14.017cm" svg:y="8.619cm">
          <text:p text:style-name="P1">USB Hub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588cm" svg:x="5.127cm" svg:y="7.349cm">
          <text:p text:style-name="P1">USB H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588cm" svg:x="5.127cm" svg:y="9.571cm">
          <text:p text:style-name="P1">USB H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858cm" svg:height="1.588cm" svg:x="10.524cm" svg:y="4.492cm">
          <text:p text:style-name="P1">Swit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5.08cm" svg:height="1.27cm" draw:transform="rotate (1.58283909863366) translate (11.159cm 11.81cm)">
          <text:p text:style-name="P6"><text:span text:style-name="T1">Analog Switch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6" draw:text-style-name="P8" draw:layer="layout" svg:x1="8.302cm" svg:y1="8.302cm" svg:x2="11.16cm" svg:y2="8.302cm">
          <text:p/>
        </draw:line>
        <draw:line draw:style-name="gr6" draw:text-style-name="P8" draw:layer="layout" svg:x1="8.302cm" svg:y1="10.525cm" svg:x2="11.16cm" svg:y2="10.525cm">
          <text:p/>
        </draw:line>
        <draw:line draw:style-name="gr6" draw:text-style-name="P8" draw:layer="layout" svg:x1="12.112cm" svg:y1="6.08cm" svg:x2="11.795cm" svg:y2="7.35cm">
          <text:p/>
        </draw:line>
        <draw:line draw:style-name="gr6" draw:text-style-name="P8" draw:layer="layout" svg:x1="12.43cm" svg:y1="9.255cm" svg:x2="14.017cm" svg:y2="9.255cm">
          <text:p/>
        </draw:line>
        <draw:line draw:style-name="gr6" draw:text-style-name="P8" draw:layer="layout" svg:x1="16.875cm" svg:y1="9.255cm" svg:x2="18.78cm" svg:y2="8.302cm">
          <text:p/>
        </draw:line>
        <draw:line draw:style-name="gr6" draw:text-style-name="P8" draw:layer="layout" svg:x1="16.875cm" svg:y1="9.572cm" svg:x2="18.78cm" svg:y2="10.8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5-12T11:31:49.721018800</meta:creation-date>
    <dc:date>2026-05-12T12:11:11.894396600</dc:date>
    <meta:editing-duration>PT3M53S</meta:editing-duration>
    <meta:editing-cycles>2</meta:editing-cycles>
    <meta:generator>LibreOffice/26.2.3.2$Windows_X86_64 LibreOffice_project/70e089b17412e4cb7773e41413306b17a2328c34</meta:generator>
    <meta:document-statistic meta:object-count="13"/>
  </office:meta>
</office:document-meta>
</file>