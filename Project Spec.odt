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9D000001FF1CEB6FA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39f35" officeooo:paragraph-rsid="00039f35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750c0" officeooo:paragraph-rsid="000750c0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49843" officeooo:paragraph-rsid="00049843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bfe38" officeooo:paragraph-rsid="000bfe38"/>
    </style:style>
    <style:style style:name="P5" style:family="paragraph" style:parent-style-name="Standard">
      <style:paragraph-properties fo:text-align="justify" style:justify-single-word="false"/>
      <style:text-properties officeooo:rsid="00049843" officeooo:paragraph-rsid="00049843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49843" officeooo:paragraph-rsid="00049843" style:font-weight-asian="bold" style:font-weight-complex="bold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0684b4" officeooo:paragraph-rsid="000684b4"/>
    </style:style>
    <style:style style:name="P8" style:family="paragraph" style:parent-style-name="Standard">
      <style:paragraph-properties fo:text-align="justify" style:justify-single-word="false"/>
      <style:text-properties officeooo:rsid="00039f35" officeooo:paragraph-rsid="00049843"/>
    </style:style>
    <style:style style:name="P9" style:family="paragraph" style:parent-style-name="Standard">
      <style:text-properties officeooo:rsid="000684b4" officeooo:paragraph-rsid="000684b4"/>
    </style:style>
    <style:style style:name="P10" style:family="paragraph" style:parent-style-name="Standard">
      <style:text-properties officeooo:rsid="0028e493" officeooo:paragraph-rsid="0028e493"/>
    </style:style>
    <style:style style:name="P11" style:family="paragraph" style:parent-style-name="Standard" style:list-style-name="L3">
      <style:text-properties officeooo:rsid="001c815b" officeooo:paragraph-rsid="001c815b"/>
    </style:style>
    <style:style style:name="P12" style:family="paragraph" style:parent-style-name="Standard" style:list-style-name="L3">
      <style:text-properties officeooo:rsid="0037fbcb" officeooo:paragraph-rsid="0037fbcb"/>
    </style:style>
    <style:style style:name="P13" style:family="paragraph" style:parent-style-name="Standard" style:list-style-name="L3">
      <style:text-properties officeooo:rsid="0021b9e9" officeooo:paragraph-rsid="0021b9e9"/>
    </style:style>
    <style:style style:name="P14" style:family="paragraph" style:parent-style-name="Standard" style:list-style-name="L3">
      <style:text-properties officeooo:rsid="0024fd36" officeooo:paragraph-rsid="0024fd36"/>
    </style:style>
    <style:style style:name="P15" style:family="paragraph" style:parent-style-name="Standard">
      <style:text-properties officeooo:rsid="00063423" officeooo:paragraph-rsid="00063423"/>
    </style:style>
    <style:style style:name="T1" style:family="text">
      <style:text-properties officeooo:rsid="000750c0"/>
    </style:style>
    <style:style style:name="T2" style:family="text">
      <style:text-properties officeooo:rsid="001a849b"/>
    </style:style>
    <style:style style:name="T3" style:family="text">
      <style:text-properties officeooo:rsid="00088fe6"/>
    </style:style>
    <style:style style:name="T4" style:family="text">
      <style:text-properties officeooo:rsid="00080ad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0749" style:font-weight-asian="bold" style:font-weight-complex="bold"/>
    </style:style>
    <style:style style:name="T7" style:family="text">
      <style:text-properties officeooo:rsid="003f4e21"/>
    </style:style>
    <style:style style:name="T8" style:family="text">
      <style:text-properties officeooo:rsid="002ff3a5"/>
    </style:style>
    <style:style style:name="T9" style:family="text">
      <style:text-properties officeooo:rsid="0024fd36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unction Requirements</text:span>:</text:p>
      <text:list text:style-name="L1">
        <text:list-item>
          <text:p text:style-name="P2">2 USB-C <text:span text:style-name="T2">host</text:span> connections (host machine), <text:span text:style-name="T2">2 USB-A peripheral connections (keyboard, mouse) </text:span><text:s/></text:p>
        </text:list-item>
        <text:list-item>
          <text:p text:style-name="P3"><text:span text:style-name="T1">S</text:span>mall and sleek. </text:p>
        </text:list-item>
        <text:list-item>
          <text:p text:style-name="P4">Switch to actuate analog switch</text:p>
        </text:list-item>
      </text:list>
      <text:p text:style-name="P5"/>
      <text:p text:style-name="P6">Architecture:</text:p>
      <text:p text:style-name="P5"><draw:frame draw:style-name="fr1" draw:name="Image1" text:anchor-type="char" svg:width="5in" svg:height="2in" draw:z-index="0"><draw:image xlink:href="Pictures/100000010000049D000001FF1CEB6FA8.png" xlink:type="simple" xlink:show="embed" xlink:actuate="onLoad" draw:mime-type="image/png"/></draw:frame></text:p>
      <text:list text:style-name="L2">
        <text:list-item>
          <text:p text:style-name="P7">Power incoming from both 5V USB-C host machines, using a diode to route the current and prevent sourcing the other connection. </text:p>
        </text:list-item>
        <text:list-item>
          <text:p text:style-name="P7">Cut 5V to 3.3V / 1.8V depending on the IC (requires buck <text:span text:style-name="T3">converter </text:span>/ <text:span text:style-name="T4">LDO</text:span>) </text:p>
        </text:list-item>
      </text:list>
      <text:p text:style-name="P8"/>
      <text:p text:style-name="P9"><text:span text:style-name="T5">IC </text:span><text:span text:style-name="T6">Info</text:span><text:span text:style-name="T5">:</text:span></text:p>
      <text:p text:style-name="P10">In order for an IC to be selected, it must be continuously available and easy to source from reputable distributors (Mouser / Digi<text:span text:style-name="T7">K</text:span>ey preferably). Also, the package must make sense within the context of the project.</text:p>
      <text:p text:style-name="P10"/>
      <text:list text:style-name="L3">
        <text:list-item>
          <text:p text:style-name="P11">USB Hub <text:span text:style-name="T8">IC</text:span>: <text:a xlink:type="simple" xlink:href="https://www.digikey.com/en/products/detail/texas-instruments/TUSB4020BIPHPR/5719086" text:style-name="Internet_20_link" text:visited-style-name="Visited_20_Internet_20_Link">TUSB4020BI</text:a></text:p>
        </text:list-item>
        <text:list-item>
          <text:p text:style-name="P11">Analog switch: <text:a xlink:type="simple" xlink:href="https://www.digikey.com/en/products/detail/texas-instruments/TMUXHS221NKGT/17748458" text:style-name="Internet_20_link" text:visited-style-name="Visited_20_Internet_20_Link">TMUXHS221</text:a></text:p>
        </text:list-item>
        <text:list-item>
          <text:p text:style-name="P12">Buck 5V – &gt;3.V:</text:p>
        </text:list-item>
        <text:list-item>
          <text:p text:style-name="P12">Buck 5V – &gt;1.1V: </text:p>
        </text:list-item>
        <text:list-item>
          <text:p text:style-name="P11">Physical switch: </text:p>
        </text:list-item>
        <text:list-item>
          <text:p text:style-name="P13">USB-A 2.0 <text:span text:style-name="T9">Recep</text:span>: <text:a xlink:type="simple" xlink:href="https://www.digikey.com/en/products/detail/amphenol-cs-fci/87583-3010RPALF/4266975?s=N4IgTCBcDaIBwHYCscDMBaVAGAjFgSgAoCCAMgGIgC6AvkA" text:style-name="Internet_20_link" text:visited-style-name="Visited_20_Internet_20_Link">87583-3010RPALF</text:a></text:p>
        </text:list-item>
        <text:list-item>
          <text:p text:style-name="P14">USB-C 2.0 Recep: <text:a xlink:type="simple" xlink:href="https://www.digikey.com/en/products/detail/molex/2171750001/13913745" text:style-name="Internet_20_link" text:visited-style-name="Visited_20_Internet_20_Link">2171750001</text:a></text:p>
        </text:list-item>
      </text:list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1T14:02:13.961928900</meta:creation-date>
    <meta:generator>LibreOffice/26.2.3.2$Windows_X86_64 LibreOffice_project/70e089b17412e4cb7773e41413306b17a2328c34</meta:generator>
    <dc:date>2026-05-12T15:34:49.801036500</dc:date>
    <meta:editing-duration>PT4H47M3S</meta:editing-duration>
    <meta:editing-cycles>38</meta:editing-cycles>
    <meta:document-statistic meta:table-count="0" meta:image-count="1" meta:object-count="0" meta:page-count="1" meta:paragraph-count="16" meta:word-count="132" meta:character-count="764" meta:non-whitespace-character-count="651"/>
  </office:meta>
</office:document-meta>
</file>